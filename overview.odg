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16cm" fo:min-width="2.965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 style:list-style-name="L1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4.916cm" fo:min-width="3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394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3.5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Linienspitzen_20_2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2.118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16cm" fo:min-width="1.967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solid" draw:stroke-dash="Dot_20__28_Rounded_29_" svg:stroke-width="0.018cm" svg:stroke-color="#000000" draw:marker-start-width="0.227cm" draw:marker-end="Linienspitzen_20_2" draw:marker-end-width="0.327cm" svg:stroke-linecap="round" draw:fill="none" draw:textarea-vertical-align="middle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none" draw:fill="none" fo:min-height="0.8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ffff" fo:min-height="0.71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7.8999996185303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weight="bold" fo:background-color="#ffffff" style:font-weight-asian="bold" style:font-weight-complex="bold"/>
    </style:style>
    <style:style style:name="P4" style:family="paragraph">
      <loext:graphic-properties draw:fill="none"/>
      <style:text-properties fo:font-size="17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background-color="transparent"/>
    </style:style>
    <style:style style:name="P7" style:family="paragraph">
      <loext:graphic-properties draw:fill="none"/>
    </style:style>
    <style:style style:name="T1" style:family="text">
      <style:text-properties fo:font-size="17.8999996185303pt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499cm" svg:height="1cm" svg:x="0.096cm" svg:y="2.521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595cm" svg:y1="3.021cm" svg:x2="7.479cm" svg:y2="3.022cm" draw:start-shape="id1" draw:start-glue-point="1" svg:d="M3595 3021l3884 1" svg:viewBox="0 0 3885 2">
          <text:p/>
        </draw:connector>
        <draw:custom-shape draw:style-name="gr3" draw:text-style-name="P2" xml:id="id3" draw:id="id3" draw:layer="layout" svg:width="4cm" svg:height="5.2cm" svg:x="9.577cm" svg:y="0.4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644cm" svg:x="10.499cm" svg:y="0.488cm">
          <draw:text-box>
            <text:p><text:span text:style-name="T1">report</text:span></text:p>
          </draw:text-box>
        </draw:frame>
        <draw:custom-shape draw:style-name="gr5" draw:text-style-name="P2" xml:id="id2" draw:id="id2" draw:layer="layout" svg:width="3.5cm" svg:height="3.8cm" svg:x="9.827cm" svg:y="1.59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7.479cm" svg:y1="3.022cm" svg:x2="9.827cm" svg:y2="3.497cm" draw:end-shape="id2" draw:end-glue-point="3" svg:d="M7479 3022c1372 0 199 475 2348 475" svg:viewBox="0 0 2349 476">
          <text:p/>
        </draw:connector>
        <draw:connector draw:style-name="gr6" draw:text-style-name="P5" draw:layer="layout" draw:type="line" svg:x1="7.479cm" svg:y1="3.022cm" svg:x2="9.577cm" svg:y2="3.019cm" draw:end-shape="id3" svg:d="M7479 3022l2098-3" svg:viewBox="0 0 2099 4">
          <text:p/>
        </draw:connector>
        <draw:custom-shape draw:style-name="gr7" draw:text-style-name="P2" draw:layer="layout" svg:width="3cm" svg:height="2.402cm" svg:x="10.077cm" svg:y="2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4" draw:id="id4" draw:layer="layout" svg:width="2.501cm" svg:height="1cm" svg:x="10.326cm" svg:y="3.873cm">
          <text:p text:style-name="P1"><text:span text:style-name="T1">locato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326cm" svg:y1="4.373cm" svg:x2="1.845cm" svg:y2="3.521cm" draw:start-shape="id4" draw:start-glue-point="3" draw:end-shape="id1" draw:end-glue-point="2" svg:d="M10326 4373h-8481v-852" svg:viewBox="0 0 8482 853">
          <text:p/>
        </draw:connector>
        <draw:frame draw:style-name="gr4" draw:text-style-name="P4" draw:layer="layout" svg:width="1.84cm" svg:height="1.644cm" svg:x="10.657cm" svg:y="1.622cm">
          <draw:text-box>
            <text:p><text:span text:style-name="T1">error</text:span></text:p>
          </draw:text-box>
        </draw:frame>
        <draw:frame draw:style-name="gr10" draw:text-style-name="P4" draw:layer="layout" svg:width="2.691cm" svg:height="1.05cm" svg:x="10.232cm" svg:y="2.742cm">
          <draw:text-box>
            <text:p><text:span text:style-name="T1">position</text:span></text:p>
          </draw:text-box>
        </draw:frame>
        <draw:frame draw:style-name="gr11" draw:text-style-name="P6" draw:layer="layout" svg:width="3.148cm" svg:height="0.963cm" svg:x="4.415cm" svg:y="2.527cm">
          <draw:text-box>
            <text:p><text:span text:style-name="T2">validator</text:span></text:p>
          </draw:text-box>
        </draw:frame>
        <draw:frame draw:style-name="gr12" draw:text-style-name="P7" draw:layer="layout" svg:width="2.839cm" svg:height="0.807cm" svg:x="4.129cm" svg:y="4.289cm">
          <draw:text-box>
            <text:p><text:span text:style-name="T3">references</text:span></text:p>
          </draw:text-box>
        </draw:frame>
        <draw:connector draw:style-name="gr9" draw:text-style-name="P5" draw:layer="layout" svg:x1="12.827cm" svg:y1="4.373cm" svg:x2="13.577cm" svg:y2="3.019cm" draw:start-shape="id4" draw:start-glue-point="1" draw:end-shape="id3" svg:d="M12827 4373h1268v-1354h-518" svg:viewBox="0 0 1269 1355">
          <text:p/>
        </draw:connector>
        <draw:connector draw:style-name="gr9" draw:text-style-name="P5" draw:layer="layout" svg:x1="12.827cm" svg:y1="4.373cm" svg:x2="13.327cm" svg:y2="3.497cm" draw:start-shape="id4" draw:start-glue-point="1" draw:end-shape="id2" draw:end-glue-point="1" svg:d="M12827 4373h1018v-876h-518" svg:viewBox="0 0 1019 8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21:49:36.169450288</meta:creation-date>
    <dc:date>2026-06-22T09:31:30.824754040</dc:date>
    <meta:editing-duration>PT15M5S</meta:editing-duration>
    <meta:editing-cycles>4</meta:editing-cycles>
    <meta:generator>LibreOffice/24.2.7.2$Linux_X86_64 LibreOffice_project/420$Build-2</meta:generator>
    <meta:document-statistic meta:object-count="16"/>
  </office:meta>
</office:document-meta>
</file>